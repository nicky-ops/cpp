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70e" officeooo:paragraph-rsid="0003570e"/>
    </style:style>
    <style:style style:name="T1" style:family="text">
      <style:text-properties officeooo:rsid="0003570e"/>
    </style:style>
    <style:style style:name="T2" style:family="text">
      <style:text-properties officeooo:rsid="0004c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- <text:span text:style-name="T1">indicates a comment</text:span></text:p>
      <text:p text:style-name="P1">function – a <text:span text:style-name="T2">named </text:span>group of <text:span text:style-name="T2">instructions for the computer to execute in order which they are written</text:span></text:p>
      <text:p text:style-name="P1">output – the result of running a program</text:p>
      <text:p text:style-name="P1">compiler – converts source code into machine/object code</text:p>
      <text:p text:style-name="P1">error – an anomaly that arises from running code due to a problem in the source code</text:p>
      <text:p text:style-name="P1">linker – links object files to produce an executable file</text:p>
      <text:p text:style-name="P1">command line – an interface used to write and run programs</text:p>
      <text:p text:style-name="P1">executable – a file that is used to run a program</text:p>
      <text:p text:style-name="P1">object code – contains code that the computer can understand</text:p>
      <text:p text:style-name="P1">comment – human readable text in source code that is used to highlight what the code does.</text:p>
      <text:p text:style-name="P1">Import – used to make available modules from a library</text:p>
      <text:p text:style-name="P1">library – set of modules containing code written by other programmers for use by other programmers</text:p>
      <text:p text:style-name="P1">module – set of source code</text:p>
      <text:p text:style-name="P1">bug – an error in the source code</text:p>
      <text:p text:style-name="P1">main() - function that tells the compiler where to begin executing the programmers</text:p>
      <text:p text:style-name="P1">C++ - a compiled programming language</text:p>
      <text:p text:style-name="P1">IDE – an integrated development environment that provides a user friendly interface for writing, debugging and running code.</text:p>
      <text:p text:style-name="P1">Source code – code that is written to be executed by the compiler</text:p>
      <text:p text:style-name="P1">statement – a piece of code that performs an action</text:p>
      <text:p text:style-name="P1">#include – used to make available other libraries in our code</text:p>
      <text:p text:style-name="P1">debugging – the process of identifying and fixing errors in the source code</text:p>
      <text:p text:style-name="P1">&lt;&lt; - output operator</text:p>
      <text:p text:style-name="P1">header file -</text:p>
      <text:p text:style-name="P1">program – a piece of software that is run to achieve a goal/task</text:p>
      <text:p text:style-name="P1">compile-time – during compilation</text:p>
      <text:p text:style-name="P1">cout – outputs characters to the screen</text:p>
      <text:p text:style-name="P1">std – selects the C++ standard library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22:04:10.154800520</meta:creation-date>
    <dc:date>2026-04-30T22:27:07.944731534</dc:date>
    <meta:editing-duration>PT9M40S</meta:editing-duration>
    <meta:editing-cycles>1</meta:editing-cycles>
    <meta:document-statistic meta:table-count="0" meta:image-count="0" meta:object-count="0" meta:page-count="1" meta:paragraph-count="27" meta:word-count="255" meta:character-count="1534" meta:non-whitespace-character-count="1283"/>
    <meta:generator>LibreOffice/24.2.7.2$Linux_X86_64 LibreOffice_project/420$Build-2</meta:generator>
  </office:meta>
</office:document-meta>
</file>